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394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4.5528in"/>
    </style:style>
    <style:style style:name="co6" style:family="table-column">
      <style:table-column-properties fo:break-before="auto" style:column-width="1.3839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yostorage_controller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eed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Pi_Pico</text:p>
          </table:table-cell>
          <table:table-cell office:value-type="string" calcext:value-type="string">
            <text:p>Module:RaspberryPi_Pico_Common_THT</text:p>
          </table:table-cell>
          <table:table-cell office:value-type="string" calcext:value-type="string">
            <text:p>w/ headers</text:p>
          </table:table-cell>
          <table:table-cell office:value-type="string" calcext:value-type="string">
            <text:p>2648-SC1632-ND</text:p>
          </table:table-cell>
          <table:table-cell table:formula="of:=[.C2]*5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s for Pico</text:p>
          </table:table-cell>
          <table:table-cell/>
          <table:table-cell office:value-type="string" calcext:value-type="string">
            <text:p>Headers, 5pk</text:p>
          </table:table-cell>
          <table:table-cell office:value-type="string" calcext:value-type="string">
            <text:p>1528-2928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PCM_JLCPCB:C_CASE-A-3216-18(mm)</text:p>
          </table:table-cell>
          <table:table-cell/>
          <table:table-cell office:value-type="string" calcext:value-type="string">
            <text:p><text:a xlink:href="https://www.digikey.ch/en/products/detail/samsung-electro-mechanics/CL31B106KAHNNNE/3887462" xlink:type="simple">1276-1804-1-ND</text:a></text:p>
          </table:table-cell>
          <table:table-cell table:formula="of:=[.C4]*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  <table:table-cell/>
          <table:table-cell office:value-type="string" calcext:value-type="string">
            <text:p>1655-1N5817TR-ND</text:p>
          </table:table-cell>
          <table:table-cell table:formula="of:=[.C5]*5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, J5, J9</text:p>
          </table:table-cell>
          <table:table-cell office:value-type="float" office:value="6" calcext:value-type="float">
            <text:p>6</text:p>
          </table:table-cell>
          <table:table-cell office:value-type="float" office:value="22112042" calcext:value-type="float">
            <text:p>22112042</text:p>
          </table:table-cell>
          <table:table-cell office:value-type="string" calcext:value-type="string">
            <text:p>Snapeda:CONN_A-6373-04A_MOL</text:p>
          </table:table-cell>
          <table:table-cell/>
          <table:table-cell office:value-type="string" calcext:value-type="string">
            <text:p>WM2702-ND</text:p>
          </table:table-cell>
          <table:table-cell table:formula="of:=[.C6]*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6, J7, J8, J10, J12, J13</text:p>
          </table:table-cell>
          <table:table-cell office:value-type="float" office:value="6" calcext:value-type="float">
            <text:p>6</text:p>
          </table:table-cell>
          <table:table-cell office:value-type="float" office:value="22112022" calcext:value-type="float">
            <text:p>22112022</text:p>
          </table:table-cell>
          <table:table-cell office:value-type="string" calcext:value-type="string">
            <text:p>Snapeda:CONN_A-6373-02A_MOL</text:p>
          </table:table-cell>
          <table:table-cell/>
          <table:table-cell office:value-type="string" calcext:value-type="string">
            <text:p>WM2700-ND</text:p>
          </table:table-cell>
          <table:table-cell table:formula="of:=[.C7]*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float" office:value="22112062" calcext:value-type="float">
            <text:p>22112062</text:p>
          </table:table-cell>
          <table:table-cell office:value-type="string" calcext:value-type="string">
            <text:p>Snapeda:CONN_A-6373-06A_MOL</text:p>
          </table:table-cell>
          <table:table-cell/>
          <table:table-cell office:value-type="string" calcext:value-type="string">
            <text:p>WM2704-ND</text:p>
          </table:table-cell>
          <table:table-cell table:formula="of:=[.C8]*5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, Q2, Q3, Q4, Q5, Q6, Q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272-BSS138TR-ND</text:p>
          </table:table-cell>
          <table:table-cell table:formula="of:=[.C9]*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7, Q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B8721PBF</text:p>
          </table:table-cell>
          <table:table-cell office:value-type="string" calcext:value-type="string">
            <text:p>Package_TO_SOT_THT:TO-220-3_Vertical</text:p>
          </table:table-cell>
          <table:table-cell/>
          <table:table-cell office:value-type="string" calcext:value-type="string">
            <text:p>IRLB3813PBF-ND</text:p>
          </table:table-cell>
          <table:table-cell table:formula="of:=[.C10]*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2, R3, R4, R9, R10, R15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1206_3216Metric_Pad1.30x1.75mm_HandSolder</text:p>
          </table:table-cell>
          <table:table-cell/>
          <table:table-cell office:value-type="string" calcext:value-type="string">
            <text:p>13-RC1206FR-13470RLTR-ND</text:p>
          </table:table-cell>
          <table:table-cell table:formula="of:=[.C11]*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5, R6, R7, R8, R11, R12, R13, R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/>
          <table:table-cell office:value-type="string" calcext:value-type="string">
            <text:p>RC1206FR-0710KL</text:p>
          </table:table-cell>
          <table:table-cell table:formula="of:=[.C12]*5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086-3.3</text:p>
          </table:table-cell>
          <table:table-cell office:value-type="string" calcext:value-type="string">
            <text:p>Snapeda:TO220-3_T_LIT</text:p>
          </table:table-cell>
          <table:table-cell/>
          <table:table-cell office:value-type="string" calcext:value-type="string">
            <text:p>LT1086CT-3.3#PBF-ND</text:p>
          </table:table-cell>
          <table:table-cell table:formula="of:=[.C13]*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G00DBV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296-9845-2-ND</text:p>
          </table:table-cell>
          <table:table-cell table:formula="of:=[.C14]*5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6:06:38.982036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5T16:13:34.309751587</dc:date>
    <meta:editing-duration>PT16M10S</meta:editing-duration>
    <meta:editing-cycles>3</meta:editing-cycles>
    <meta:generator>LibreOffice/25.2.5.2$Linux_X86_64 LibreOffice_project/520$Build-2</meta:generator>
    <meta:document-statistic meta:table-count="1" meta:cell-count="99" meta:object-count="0"/>
  </office:meta>
</office:document-meta>
</file>